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0F054E814C1107CB73F.jpg" manifest:media-type="image/jpeg"/>
  <manifest:file-entry manifest:full-path="Pictures/100000000000019E000000CB63720273EB06D58D.jpg" manifest:media-type="image/jpeg"/>
  <manifest:file-entry manifest:full-path="Pictures/10000000000002BC000001C0D417D5D7E82AC042.jpg" manifest:media-type="image/jpeg"/>
  <manifest:file-entry manifest:full-path="Pictures/1000000000000278000001F984D1F387D191785C.jpg" manifest:media-type="image/jpeg"/>
  <manifest:file-entry manifest:full-path="Pictures/100000000000017F000001171493BD0C9C2D17E7.jpg" manifest:media-type="image/jpeg"/>
  <manifest:file-entry manifest:full-path="Pictures/10000000000001C7000000F9E78A1BF3AD9B62C5.jpg" manifest:media-type="image/jpeg"/>
  <manifest:file-entry manifest:full-path="Pictures/10000000000001D70000016ED97F7EF2A0296502.jpg" manifest:media-type="image/jpeg"/>
  <manifest:file-entry manifest:full-path="Pictures/100000000000021A000000E55CFB2F1298CB4039.jpg" manifest:media-type="image/jpeg"/>
  <manifest:file-entry manifest:full-path="Pictures/10000000000001960000011131EE2818C1365DB7.jpg" manifest:media-type="image/jpeg"/>
  <manifest:file-entry manifest:full-path="Pictures/10000000000001A6000001707C842E64308B2872.jpg" manifest:media-type="image/jpeg"/>
  <manifest:file-entry manifest:full-path="Pictures/100000000000028C00000211732AC3DAED0D7C81.jpg" manifest:media-type="image/jpeg"/>
  <manifest:file-entry manifest:full-path="Pictures/100000000000015B00000108161523ED277542FE.jpg" manifest:media-type="image/jpeg"/>
  <manifest:file-entry manifest:full-path="Pictures/10000000000001910000008DC636CE138ACA8E69.jpg" manifest:media-type="image/jpeg"/>
  <manifest:file-entry manifest:full-path="Pictures/10000000000000A400000028053BBF7B4C11E4CF.jpg" manifest:media-type="image/jpeg"/>
  <manifest:file-entry manifest:full-path="Pictures/10000000000001E6000001609474A28F5D163B7E.jpg" manifest:media-type="image/jpeg"/>
  <manifest:file-entry manifest:full-path="Pictures/100000000000013300000109FC726CA79A5E358E.jpg" manifest:media-type="image/jpeg"/>
  <manifest:file-entry manifest:full-path="Pictures/10000000000001D80000017211D86BEEFC7AB6D9.jpg" manifest:media-type="image/jpeg"/>
  <manifest:file-entry manifest:full-path="Pictures/100000000000022C000001522B1A52AA33603D2F.jpg" manifest:media-type="image/jpeg"/>
  <manifest:file-entry manifest:full-path="Pictures/10000000000001A7000001703B4BA213C1675527.jpg" manifest:media-type="image/jpeg"/>
  <manifest:file-entry manifest:full-path="Pictures/10000000000001AB0000016AA5E0646477DF06C5.jpg" manifest:media-type="image/jpeg"/>
  <manifest:file-entry manifest:full-path="Pictures/100000000000016E0000013FA4EB9BDB3D0CBE2F.jpg" manifest:media-type="image/jpeg"/>
  <manifest:file-entry manifest:full-path="Pictures/10000000000001A2000000C08BCEC9A86BC22E19.jpg" manifest:media-type="image/jpeg"/>
  <manifest:file-entry manifest:full-path="Pictures/10000000000001AB0000016F56D4080F4399610B.jpg" manifest:media-type="image/jpeg"/>
  <manifest:file-entry manifest:full-path="Pictures/10000000000001A8000000996A552C09DC373019.jpg" manifest:media-type="image/jpeg"/>
  <manifest:file-entry manifest:full-path="Pictures/100000000000015B00000110E2B6BC938541F640.jpg" manifest:media-type="image/jpeg"/>
  <manifest:file-entry manifest:full-path="Pictures/100000000000015400000127E2CD63247E859885.jpg" manifest:media-type="image/jpeg"/>
  <manifest:file-entry manifest:full-path="Pictures/100000000000016A000000EF619BEEB66F7CA8B3.jpg" manifest:media-type="image/jpeg"/>
  <manifest:file-entry manifest:full-path="Pictures/1000000000000128000000E52CE2C95F5FC2762A.jpg" manifest:media-type="image/jpeg"/>
  <manifest:file-entry manifest:full-path="Pictures/10000000000002F7000000EE5CBF02944D3D28AF.jpg" manifest:media-type="image/jpeg"/>
  <manifest:file-entry manifest:full-path="Pictures/100000000000015B000000C52451CDB4F1B85715.jpg" manifest:media-type="image/jpeg"/>
  <manifest:file-entry manifest:full-path="Pictures/100000000000011C000000E39E8EDF67DDCA3C5C.jpg" manifest:media-type="image/jpeg"/>
  <manifest:file-entry manifest:full-path="Pictures/10000000000001C2000000C42A8BD579E3784C65.jpg" manifest:media-type="image/jpeg"/>
  <manifest:file-entry manifest:full-path="Pictures/100000000000018F000000B1A6E0BF4008CA7AC3.jpg" manifest:media-type="image/jpeg"/>
  <manifest:file-entry manifest:full-path="Pictures/100000000000010F0000009D0A5283D3C9A21812.jpg" manifest:media-type="image/jpeg"/>
  <manifest:file-entry manifest:full-path="Pictures/10000000000001AC00000177CC9AF3732147523F.jpg" manifest:media-type="image/jpeg"/>
  <manifest:file-entry manifest:full-path="Pictures/100000000000019A000000550578F1D3EC80F85D.jpg" manifest:media-type="image/jpeg"/>
  <manifest:file-entry manifest:full-path="Pictures/1000000000000184000001722189EB7CB5C126AF.jpg" manifest:media-type="image/jpeg"/>
  <manifest:file-entry manifest:full-path="Pictures/100000000000018C0000012868D5E1243D660B52.jpg" manifest:media-type="image/jpeg"/>
  <manifest:file-entry manifest:full-path="Pictures/100000000000012E000000B1350F323105E466F0.jpg" manifest:media-type="image/jpeg"/>
  <manifest:file-entry manifest:full-path="Pictures/100000000000020200000150C9EB61F60F2DB0EB.jpg" manifest:media-type="image/jpeg"/>
  <manifest:file-entry manifest:full-path="Pictures/1000000000000212000000E6234F56C2CA74C397.jpg" manifest:media-type="image/jpeg"/>
  <manifest:file-entry manifest:full-path="Pictures/100000000000013800000155890703854F8CE955.jpg" manifest:media-type="image/jpeg"/>
  <manifest:file-entry manifest:full-path="Pictures/10000000000001950000011688BAE032486C0250.jpg" manifest:media-type="image/jpeg"/>
  <manifest:file-entry manifest:full-path="Pictures/10000000000001880000007DF824779FEE419E25.jpg" manifest:media-type="image/jpeg"/>
  <manifest:file-entry manifest:full-path="Pictures/100000000000019D0000011C44D53DD62BF21005.jpg" manifest:media-type="image/jpeg"/>
  <manifest:file-entry manifest:full-path="Pictures/10000000000001CC0000014833552FEB80B73F0A.jpg" manifest:media-type="image/jpeg"/>
  <manifest:file-entry manifest:full-path="Pictures/100000000000014D00000104E124AA5D85024091.jpg" manifest:media-type="image/jpeg"/>
  <manifest:file-entry manifest:full-path="Pictures/10000000000000DD0000010C4463312DDA62F482.jpg" manifest:media-type="image/jpeg"/>
  <manifest:file-entry manifest:full-path="Pictures/100000000000021800000123BF65CDDFEDC692A1.jpg" manifest:media-type="image/jpeg"/>
  <manifest:file-entry manifest:full-path="Pictures/10000000000000A90000008D9A70278BEAD2DFD8.jpg" manifest:media-type="image/jpeg"/>
  <manifest:file-entry manifest:full-path="Pictures/100000000000022200000128C529B087E3D34402.jpg" manifest:media-type="image/jpeg"/>
  <manifest:file-entry manifest:full-path="Pictures/10000000000002A90000011F0F73803246ECC808.jpg" manifest:media-type="image/jpeg"/>
  <manifest:file-entry manifest:full-path="Pictures/1000000000000152000000D974B27369FF174A14.jpg" manifest:media-type="image/jpeg"/>
  <manifest:file-entry manifest:full-path="Pictures/1000000000000188000000421EF83859EB21F65E.jpg" manifest:media-type="image/jpeg"/>
  <manifest:file-entry manifest:full-path="Pictures/1000000000000292000000986D24DD29D4A7456F.jpg" manifest:media-type="image/jpeg"/>
  <manifest:file-entry manifest:full-path="Pictures/10000000000001BF00000123F3E0E91AFF470116.jpg" manifest:media-type="image/jpeg"/>
  <manifest:file-entry manifest:full-path="Pictures/10000000000001D9000000C9F08508D7A254ED61.jpg" manifest:media-type="image/jpeg"/>
  <manifest:file-entry manifest:full-path="Pictures/10000000000002CD000000A417C7B96AA9E3C59E.jpg" manifest:media-type="image/jpeg"/>
  <manifest:file-entry manifest:full-path="Pictures/1000000000000166000001183A062D42D6665E86.jpg" manifest:media-type="image/jpeg"/>
  <manifest:file-entry manifest:full-path="Pictures/100000000000015D0000018F63CAAB27024D7717.jpg" manifest:media-type="image/jpeg"/>
  <manifest:file-entry manifest:full-path="Pictures/10000000000002B4000000BDFB72A00DCEAE6513.jpg" manifest:media-type="image/jpeg"/>
  <manifest:file-entry manifest:full-path="Pictures/1000000000000206000001A0F43E5BE072FEAB60.jpg" manifest:media-type="image/jpeg"/>
  <manifest:file-entry manifest:full-path="Pictures/100000000000013500000098AB80DEFC4E823075.jpg" manifest:media-type="image/jpeg"/>
  <manifest:file-entry manifest:full-path="Pictures/100000000000023A000000FD450BF322B23B6D42.jpg" manifest:media-type="image/jpeg"/>
  <manifest:file-entry manifest:full-path="Pictures/10000000000001F1000001319AE69043BE865712.jpg" manifest:media-type="image/jpeg"/>
  <manifest:file-entry manifest:full-path="Pictures/10000000000001F100000122E8BCD069830BAA9D.jpg" manifest:media-type="image/jpeg"/>
  <manifest:file-entry manifest:full-path="Pictures/10000000000001FB000001261D9E27DB5938467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table:border-model="collapsing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 style:may-break-between-rows="true" table:border-model="collapsing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table:border-model="collapsing"/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cm" table:align="margins" style:may-break-between-rows="true" table:border-model="collapsing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may-break-between-rows="true" table:border-model="collapsing"/>
    </style:style>
    <style:style style:name="Table9.A" style:family="table-column">
      <style:table-column-properties style:column-width="17cm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may-break-between-rows="true" table:border-model="collapsing"/>
    </style:style>
    <style:style style:name="Table10.A" style:family="table-column">
      <style:table-column-properties style:column-width="17cm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" style:family="table">
      <style:table-properties style:width="17cm" table:align="margins" style:may-break-between-rows="true" table:border-model="collapsing"/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" style:family="table">
      <style:table-properties style:width="17cm" table:align="margins" style:may-break-between-rows="true" table:border-model="collapsing"/>
    </style:style>
    <style:style style:name="Table12.A" style:family="table-column">
      <style:table-column-properties style:column-width="17cm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margins" style:may-break-between-rows="true" table:border-model="collapsing"/>
    </style:style>
    <style:style style:name="Table13.A" style:family="table-column">
      <style:table-column-properties style:column-width="17cm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17cm" table:align="margins" style:may-break-between-rows="true" table:border-model="collapsing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17cm" table:align="margins" style:may-break-between-rows="true" table:border-model="collapsing"/>
    </style:style>
    <style:style style:name="Table15.A" style:family="table-column">
      <style:table-column-properties style:column-width="17cm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17cm" table:align="margins" style:may-break-between-rows="true" table:border-model="collapsing"/>
    </style:style>
    <style:style style:name="Table16.A" style:family="table-column">
      <style:table-column-properties style:column-width="17cm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cm" table:align="margins" style:may-break-between-rows="true" table:border-model="collapsing"/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7cm" table:align="margins" style:may-break-between-rows="true" table:border-model="collapsing"/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17cm" table:align="margins" style:may-break-between-rows="true" table:border-model="collapsing"/>
    </style:style>
    <style:style style:name="Table19.A" style:family="table-column">
      <style:table-column-properties style:column-width="17cm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20.A" style:family="table-column">
      <style:table-column-properties style:column-width="17cm" style:rel-column-width="65534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ourier New" fo:font-size="26pt" fo:font-weight="bold" officeooo:rsid="0017bf12" officeooo:paragraph-rsid="0017bf12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Courier New" fo:font-size="12pt" fo:font-weight="bold" officeooo:rsid="0017bf12" officeooo:paragraph-rsid="0017bf12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Courier New" fo:font-size="12pt" fo:font-weight="normal" officeooo:rsid="0017bf12" officeooo:paragraph-rsid="0017bf12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ourier New" fo:font-size="12pt" fo:font-weight="normal" officeooo:rsid="0017bf12" officeooo:paragraph-rsid="0017f68a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Courier New" fo:font-size="12pt" fo:font-weight="normal" officeooo:rsid="0017bf12" officeooo:paragraph-rsid="0025826e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ourier New" fo:font-size="15pt" fo:font-weight="bold" officeooo:rsid="0017bf12" officeooo:paragraph-rsid="0017bf12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17bf12"/>
    </style:style>
    <style:style style:name="P8" style:family="paragraph" style:parent-style-name="Standard">
      <style:text-properties officeooo:paragraph-rsid="00196c1a"/>
    </style:style>
    <style:style style:name="P9" style:family="paragraph" style:parent-style-name="Standard">
      <style:text-properties fo:color="#c9211e" loext:opacity="100%" style:font-name="Courier New" fo:font-size="15pt" fo:font-weight="bold" officeooo:rsid="001a0001" officeooo:paragraph-rsid="00231d7c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c9211e" loext:opacity="100%" style:font-name="Courier New" fo:font-size="15pt" fo:font-weight="bold" officeooo:rsid="001a0001" officeooo:paragraph-rsid="001a0001" fo:background-color="#ffff00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c9211e" loext:opacity="100%" style:font-name="Courier New" fo:font-size="15pt" fo:font-weight="bold" officeooo:rsid="0017f68a" officeooo:paragraph-rsid="0017f68a" fo:background-color="#ffff00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c9211e" loext:opacity="100%" style:font-name="Courier New" fo:font-size="15pt" fo:font-weight="bold" officeooo:rsid="00266dd7" officeooo:paragraph-rsid="0026fb0f" fo:background-color="#ffff00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c9211e" loext:opacity="100%" style:font-name="Courier New" fo:font-size="15pt" fo:font-weight="bold" officeooo:rsid="00266dd7" officeooo:paragraph-rsid="00285350" fo:background-color="#ffff00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c9211e" loext:opacity="100%" style:font-name="Courier New" fo:font-size="15pt" fo:font-weight="bold" officeooo:rsid="0026fb0f" officeooo:paragraph-rsid="0026fb0f" fo:background-color="#ffff00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c9211e" loext:opacity="100%" style:font-name="Courier New" fo:font-size="15pt" fo:font-weight="bold" officeooo:rsid="00271506" officeooo:paragraph-rsid="00271506" fo:background-color="#ffff00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c9211e" loext:opacity="100%" style:font-name="Courier New" fo:font-size="15pt" fo:font-weight="bold" officeooo:rsid="0027feed" officeooo:paragraph-rsid="0027feed" fo:background-color="#ffff00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c9211e" loext:opacity="100%" style:font-name="Courier New" fo:font-size="15pt" fo:font-weight="bold" officeooo:rsid="00285350" officeooo:paragraph-rsid="00285350" fo:background-color="#ffff00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c9211e" loext:opacity="100%" style:font-name="Courier New" fo:font-size="15pt" fo:font-weight="bold" officeooo:rsid="002bae2f" officeooo:paragraph-rsid="002bae2f" fo:background-color="#ffff00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c9211e" loext:opacity="100%" style:font-name="Courier New" fo:font-size="15pt" fo:font-weight="bold" officeooo:rsid="002d2660" officeooo:paragraph-rsid="002d2660" fo:background-color="#ffff00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c9211e" loext:opacity="100%" style:font-name="Courier New" fo:font-size="15pt" fo:font-weight="bold" officeooo:rsid="00338371" officeooo:paragraph-rsid="00338371" fo:background-color="#ffff00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c9211e" loext:opacity="100%" style:font-name="Courier New" fo:font-size="15pt" fo:font-weight="bold" officeooo:rsid="0033f6b8" officeooo:paragraph-rsid="0033f6b8" fo:background-color="#ffff00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paragraph-rsid="00231d7c"/>
    </style:style>
    <style:style style:name="P23" style:family="paragraph" style:parent-style-name="Standard">
      <style:text-properties officeooo:paragraph-rsid="002550bd" fo:background-color="#ffff00"/>
    </style:style>
    <style:style style:name="P24" style:family="paragraph" style:parent-style-name="Standard">
      <style:text-properties officeooo:paragraph-rsid="0025826e"/>
    </style:style>
    <style:style style:name="P25" style:family="paragraph" style:parent-style-name="Standard">
      <style:text-properties officeooo:paragraph-rsid="00266dd7"/>
    </style:style>
    <style:style style:name="P26" style:family="paragraph" style:parent-style-name="Standard">
      <style:text-properties officeooo:paragraph-rsid="0026fb0f"/>
    </style:style>
    <style:style style:name="P27" style:family="paragraph" style:parent-style-name="Standard">
      <style:text-properties officeooo:paragraph-rsid="002f6902"/>
    </style:style>
    <style:style style:name="P28" style:family="paragraph" style:parent-style-name="Standard">
      <style:text-properties officeooo:paragraph-rsid="0030f498"/>
    </style:style>
    <style:style style:name="P29" style:family="paragraph" style:parent-style-name="Standard">
      <style:text-properties officeooo:paragraph-rsid="00327752"/>
    </style:style>
    <style:style style:name="P30" style:family="paragraph" style:parent-style-name="Standard">
      <style:text-properties officeooo:paragraph-rsid="00338371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5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82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5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69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7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b0f" officeooo:paragraph-rsid="0026fb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officeooo:paragraph-rsid="0025826e"/>
    </style:style>
    <style:style style:name="P40" style:family="paragraph" style:parent-style-name="Table_20_Contents">
      <style:paragraph-properties fo:text-align="start" style:justify-single-word="false"/>
      <style:text-properties officeooo:paragraph-rsid="002f6902"/>
    </style:style>
    <style:style style:name="P41" style:family="paragraph" style:parent-style-name="Table_20_Contents">
      <style:paragraph-properties fo:text-align="start" style:justify-single-word="false"/>
      <style:text-properties officeooo:paragraph-rsid="00327752"/>
    </style:style>
    <style:style style:name="P42" style:family="paragraph" style:parent-style-name="Heading_20_1">
      <style:text-properties style:font-name="Courier New" fo:font-size="12pt" fo:font-weight="normal" officeooo:rsid="0017bf12" style:font-size-asian="10.5pt" style:font-weight-asian="normal" style:font-size-complex="12pt" style:font-weight-complex="normal"/>
    </style:style>
    <style:style style:name="P43" style:family="paragraph" style:parent-style-name="Heading_20_1">
      <style:text-properties style:font-name="Courier New" fo:font-size="12pt" fo:font-weight="normal" officeooo:rsid="0017bf12" officeooo:paragraph-rsid="0025826e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style:font-name="Courier New" fo:font-size="12pt" fo:font-weight="normal" officeooo:rsid="0017bf12" officeooo:paragraph-rsid="0017bf12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officeooo:paragraph-rsid="0017bf12"/>
    </style:style>
    <style:style style:name="P46" style:family="paragraph" style:parent-style-name="Standard">
      <style:text-properties fo:color="#c9211e" loext:opacity="100%" style:font-name="Courier New" fo:font-size="15pt" fo:font-weight="bold" officeooo:rsid="00231d7c" officeooo:paragraph-rsid="00231d7c" fo:background-color="#ffff00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c9211e" loext:opacity="100%" style:font-name="Courier New" fo:font-size="15pt" fo:font-weight="bold" officeooo:rsid="00231d7c" officeooo:paragraph-rsid="0025826e" fo:background-color="#ffff00" style:font-size-asian="15pt" style:font-weight-asian="bold" style:font-size-complex="15pt" style:font-weight-complex="bold"/>
    </style:style>
    <style:style style:name="P48" style:family="paragraph" style:parent-style-name="Standard">
      <style:text-properties fo:color="#c9211e" loext:opacity="100%" style:font-name="Courier New" fo:font-size="15pt" fo:font-weight="bold" officeooo:rsid="0025826e" officeooo:paragraph-rsid="0025826e" fo:background-color="#ffff00" style:font-size-asian="15pt" style:font-weight-asian="bold" style:font-size-complex="15pt" style:font-weight-complex="bold"/>
    </style:style>
    <style:style style:name="P49" style:family="paragraph" style:parent-style-name="Standard">
      <style:text-properties fo:color="#c9211e" loext:opacity="100%" style:font-name="Courier New" fo:font-size="15pt" fo:font-weight="bold" officeooo:rsid="00266dd7" officeooo:paragraph-rsid="00266dd7" fo:background-color="#ffff00" style:font-size-asian="15pt" style:font-weight-asian="bold" style:font-size-complex="15pt" style:font-weight-complex="bold"/>
    </style:style>
    <style:style style:name="P50" style:family="paragraph" style:parent-style-name="Standard">
      <style:text-properties fo:color="#c9211e" loext:opacity="100%" style:font-name="Courier New" fo:font-size="15pt" fo:font-weight="bold" officeooo:rsid="00327752" officeooo:paragraph-rsid="0030f498" fo:background-color="#ffff00" style:font-size-asian="15pt" style:font-weight-asian="bold" style:font-size-complex="15pt" style:font-weight-complex="bold"/>
    </style:style>
    <style:style style:name="P51" style:family="paragraph" style:parent-style-name="Standard">
      <style:text-properties officeooo:paragraph-rsid="00374336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79b" officeooo:paragraph-rsid="003bb7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size="15pt" fo:font-weight="bold" officeooo:rsid="0017bf12" style:font-size-asian="15pt" style:font-weight-asian="bold" style:font-size-complex="15pt" style:font-weight-complex="bold"/>
    </style:style>
    <style:style style:name="T3" style:family="text">
      <style:text-properties style:font-name="Courier New" fo:font-size="15pt" fo:font-weight="bold" officeooo:rsid="00196c1a" style:font-size-asian="15pt" style:font-weight-asian="bold" style:font-size-complex="15pt" style:font-weight-complex="bold"/>
    </style:style>
    <style:style style:name="T4" style:family="text">
      <style:text-properties style:font-name="Courier New" fo:font-size="15pt" fo:font-weight="bold" officeooo:rsid="00231d7c" style:font-size-asian="15pt" style:font-weight-asian="bold" style:font-size-complex="15pt" style:font-weight-complex="bold"/>
    </style:style>
    <style:style style:name="T5" style:family="text">
      <style:text-properties style:font-name="Courier New" fo:font-size="15pt" fo:font-weight="bold" officeooo:rsid="00374336" style:font-size-asian="15pt" style:font-weight-asian="bold" style:font-size-complex="15pt" style:font-weight-complex="bold"/>
    </style:style>
    <style:style style:name="T6" style:family="text">
      <style:text-properties officeooo:rsid="0017f68a"/>
    </style:style>
    <style:style style:name="T7" style:family="text">
      <style:text-properties officeooo:rsid="00196c1a"/>
    </style:style>
    <style:style style:name="T8" style:family="text">
      <style:text-properties officeooo:rsid="001a0001"/>
    </style:style>
    <style:style style:name="T9" style:family="text">
      <style:text-properties fo:color="#c9211e" loext:opacity="100%" style:font-name="Courier New" fo:font-size="15pt" fo:font-weight="bold" officeooo:rsid="00231d7c" style:font-size-asian="15pt" style:font-weight-asian="bold" style:font-size-complex="15pt" style:font-weight-complex="bold"/>
    </style:style>
    <style:style style:name="T10" style:family="text">
      <style:text-properties fo:color="#c9211e" loext:opacity="100%" style:font-name="Courier New" fo:font-size="15pt" fo:font-weight="bold" officeooo:rsid="002550bd" style:font-size-asian="15pt" style:font-weight-asian="bold" style:font-size-complex="15pt" style:font-weight-complex="bold"/>
    </style:style>
    <style:style style:name="T11" style:family="text">
      <style:text-properties fo:color="#c9211e" loext:opacity="100%" style:font-name="Courier New" fo:font-size="15pt" fo:font-weight="bold" officeooo:rsid="002550bd" fo:background-color="#ffff00" loext:char-shading-value="0" style:font-size-asian="15pt" style:font-weight-asian="bold" style:font-size-complex="15pt" style:font-weight-complex="bold"/>
    </style:style>
    <style:style style:name="T12" style:family="text">
      <style:text-properties fo:color="#c9211e" loext:opacity="100%" style:font-name="Courier New" fo:font-size="15pt" fo:font-weight="bold" officeooo:rsid="0025826e" fo:background-color="#ffff00" loext:char-shading-value="0" style:font-size-asian="15pt" style:font-weight-asian="bold" style:font-size-complex="15pt" style:font-weight-complex="bold"/>
    </style:style>
    <style:style style:name="T13" style:family="text">
      <style:text-properties fo:color="#c9211e" loext:opacity="100%" style:font-name="Courier New" fo:font-size="15pt" fo:font-weight="bold" officeooo:rsid="0025fb37" fo:background-color="#ffff00" loext:char-shading-value="0" style:font-size-asian="15pt" style:font-weight-asian="bold" style:font-size-complex="15pt" style:font-weight-complex="bold"/>
    </style:style>
    <style:style style:name="T14" style:family="text">
      <style:text-properties fo:color="#c9211e" loext:opacity="100%" style:font-name="Courier New" fo:font-size="15pt" fo:font-weight="bold" officeooo:rsid="00266dd7" fo:background-color="#ffff00" loext:char-shading-value="0" style:font-size-asian="15pt" style:font-weight-asian="bold" style:font-size-complex="15pt" style:font-weight-complex="bold"/>
    </style:style>
    <style:style style:name="T15" style:family="text">
      <style:text-properties fo:color="#c9211e" loext:opacity="100%" style:font-name="Courier New" fo:font-size="15pt" fo:font-weight="bold" officeooo:rsid="002bae2f" fo:background-color="#ffff00" loext:char-shading-value="0" style:font-size-asian="15pt" style:font-weight-asian="bold" style:font-size-complex="15pt" style:font-weight-complex="bold"/>
    </style:style>
    <style:style style:name="T16" style:family="text">
      <style:text-properties fo:color="#c9211e" loext:opacity="100%" style:font-name="Courier New" fo:font-size="15pt" fo:font-weight="bold" officeooo:rsid="002d2660" fo:background-color="#ffff00" loext:char-shading-value="0" style:font-size-asian="15pt" style:font-weight-asian="bold" style:font-size-complex="15pt" style:font-weight-complex="bold"/>
    </style:style>
    <style:style style:name="T17" style:family="text">
      <style:text-properties fo:color="#c9211e" loext:opacity="100%" style:font-name="Courier New" fo:font-size="15pt" fo:font-weight="bold" officeooo:rsid="00327752" fo:background-color="#ffff00" loext:char-shading-value="0" style:font-size-asian="15pt" style:font-weight-asian="bold" style:font-size-complex="15pt" style:font-weight-complex="bold"/>
    </style:style>
    <style:style style:name="T18" style:family="text">
      <style:text-properties officeooo:rsid="001a3208"/>
    </style:style>
    <style:style style:name="T19" style:family="text">
      <style:text-properties officeooo:rsid="0024c62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c6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b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9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25826e"/>
    </style:style>
    <style:style style:name="T28" style:family="text">
      <style:text-properties officeooo:rsid="00266dd7"/>
    </style:style>
    <style:style style:name="T29" style:family="text">
      <style:text-properties officeooo:rsid="0026fb0f"/>
    </style:style>
    <style:style style:name="T30" style:family="text">
      <style:text-properties officeooo:rsid="0027feed"/>
    </style:style>
    <style:style style:name="T31" style:family="text">
      <style:text-properties officeooo:rsid="00285350"/>
    </style:style>
    <style:style style:name="T32" style:family="text">
      <style:text-properties officeooo:rsid="002a0354"/>
    </style:style>
    <style:style style:name="T33" style:family="text">
      <style:text-properties officeooo:rsid="002af57f"/>
    </style:style>
    <style:style style:name="T34" style:family="text">
      <style:text-properties officeooo:rsid="002bae2f"/>
    </style:style>
    <style:style style:name="T35" style:family="text">
      <style:text-properties officeooo:rsid="002f6902"/>
    </style:style>
    <style:style style:name="T36" style:family="text">
      <style:text-properties officeooo:rsid="00327752"/>
    </style:style>
    <style:style style:name="T37" style:family="text">
      <style:text-properties officeooo:rsid="00338371"/>
    </style:style>
    <style:style style:name="T38" style:family="text">
      <style:text-properties officeooo:rsid="0033f6b8"/>
    </style:style>
    <style:style style:name="T39" style:family="text">
      <style:text-properties officeooo:rsid="0039fe35"/>
    </style:style>
    <style:style style:name="T40" style:family="text">
      <style:text-properties officeooo:rsid="003bb7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thwind Traders Ltd – Active Directory Project</text:p>
      <text:p text:style-name="P1"/>
      <text:p text:style-name="P6">1 -(Information)</text:p>
      <text:p text:style-name="P1"/>
      <text:p text:style-name="P2">-<text:span text:style-name="T1"> The aim for this project is to showcase my current Active Directory skills and planning, with the goal to create and maintain a structured and functional Active Directory setup for Northwind Traders Ltd.</text:span></text:p>
      <text:p text:style-name="P3"/>
      <text:p text:style-name="P3">- Throughout this project, I will be demonstrating my abilities, including:</text:p>
      <text:p text:style-name="P3"/>
      <text:p text:style-name="P3">- Creating a New Organisational Unit</text:p>
      <text:p text:style-name="P3">- Delegate OU Control</text:p>
      <text:p text:style-name="P3">- Delete or Rename an OU</text:p>
      <text:p text:style-name="P3">- Search inside an OU</text:p>
      <text:p text:style-name="P3">- Export an OU List</text:p>
      <text:p text:style-name="P3">- Remove OU Deletion Protection</text:p>
      <text:p text:style-name="P3">- Creating a User Account </text:p>
      <text:p text:style-name="P3">- Finding Objects &amp; Assets in Active Directory</text:p>
      <text:p text:style-name="P3">- View a File Path of an Object</text:p>
      <text:p text:style-name="P3">- Find &amp; Move a Computer to a New OU</text:p>
      <text:p text:style-name="P3">- Reseting User Passwords</text:p>
      <text:p text:style-name="P3">- Unlock a User's Account (with no password change)</text:p>
      <text:p text:style-name="P3">- Creating a New Security Group/Group</text:p>
      <text:p text:style-name="P3">- Adding a User to a Group</text:p>
      <text:p text:style-name="P3">- Adding a Group as a Member of Another Group</text:p>
      <text:p text:style-name="P3">- Removing a User or Group from a Group</text:p>
      <text:p text:style-name="P3">- Deleting a Group</text:p>
      <text:p text:style-name="P3">- Disable a User Account</text:p>
      <text:p text:style-name="P3">- Delete an Account</text:p>
      <text:p text:style-name="P3"/>
      <text:p text:style-name="P6">2 -(Briefing)</text:p>
      <text:p text:style-name="P3"/>
      <text:p text:style-name="P3">Northwind Traders Ltd is a growing company with multiple departments. The IT team has been tasked with designing and managing an Active Directory (AD) environment to improve organization, security, and access control.<text:line-break/><text:line-break/></text:p>
      <text:p text:style-name="P3">The company structure includes:<text:line-break/><text:line-break/>- HR Department<text:line-break/>- Finance Department<text:line-break/>- IT Department<text:line-break/>- Sales Department<text:line-break/><text:line-break/><text:soft-page-break/>I have endured the role of a Junior System Administrator, who is responsible for implementing and maintaining AD.</text:p>
      <text:p text:style-name="P3"/>
      <text:p text:style-name="P3">My goals for this Project are: </text:p>
      <text:p text:style-name="P3"/>
      <text:p text:style-name="P3">- Design and manage Organisational Units (OUs)<text:line-break/>- Create and manage user accounts<text:line-break/>- Implement group-based access control<text:line-break/>- Apply and troubleshoot Group Policy Objects (GPOs)<text:line-break/>- Maintain and secure AD objects</text:p>
      <text:p text:style-name="P3"/>
      <text:p text:style-name="P6">3 -(Part 1 – Creating the Organisational Structure)</text:p>
      <text:p text:style-name="P3"/>
      <text:p text:style-name="P11">The Top-Level OU</text:p>
      <table:table table:name="Table1" table:style-name="Table1" table:template-name="Default Style">
        <table:table-column table:style-name="Table1.A"/>
        <table:table-row table:style-name="TableLine2152248445408">
          <table:table-cell table:style-name="Table1.A1" office:value-type="string">
            <text:p text:style-name="P31"><draw:frame draw:style-name="fr2" draw:name="Image1" text:anchor-type="char" svg:x="1.03cm" svg:y="0.482cm" svg:width="14.799cm" svg:height="3.791cm" draw:z-index="0"><draw:image xlink:href="Pictures/10000000000003A9000000F054E814C1107CB73F.jpg" xlink:type="simple" xlink:show="embed" xlink:actuate="onLoad" draw:mime-type="image/jpeg"/></draw:frame></text:p>
            <text:p text:style-name="P31">- <text:span text:style-name="T6">First I must go into Active Directory Users and Computers to commence the creation</text:span></text:p>
          </table:table-cell>
        </table:table-row>
        <table:table-row table:style-name="Table1.2">
          <table:table-cell table:style-name="Table1.A2" office:value-type="string">
            <text:p text:style-name="P31"><draw:frame draw:style-name="fr2" draw:name="Image2" text:anchor-type="char" svg:x="2.926cm" svg:y="0.009cm" svg:width="10.903cm" svg:height="8.712cm" draw:z-index="1"><draw:image xlink:href="Pictures/1000000000000278000001F984D1F387D191785C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6">I right-click on my Domain, “New” then select “Organisational Unit”</text:span></text:p>
          </table:table-cell>
        </table:table-row>
        <table:table-row table:style-name="TableLine2152248451392">
          <table:table-cell table:style-name="Table1.A2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draw:frame draw:style-name="fr2" draw:name="Image3" text:anchor-type="char" svg:x="5.034cm" svg:y="0.226cm" svg:width="6.784cm" svg:height="5.916cm" draw:z-index="2"><draw:image xlink:href="Pictures/10000000000001A6000001707C842E64308B2872.jpg" xlink:type="simple" xlink:show="embed" xlink:actuate="onLoad" draw:mime-type="image/jpeg"/></draw:frame><text:soft-page-break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6">I can now name my Top-Level Organisational Unit and Protect it from Accidental Deletion</text:span></text:p>
          </table:table-cell>
        </table:table-row>
      </table:table>
      <text:p text:style-name="P3"/>
      <text:p text:style-name="P11">The Sub-OUs</text:p>
      <table:table table:name="Table2" table:style-name="Table2" table:template-name="Default Style">
        <table:table-column table:style-name="Table2.A"/>
        <table:table-row table:style-name="TableLine2152248443504">
          <table:table-cell table:style-name="Table2.A1" office:value-type="string">
            <text:p text:style-name="P31"><draw:frame draw:style-name="fr2" draw:name="Image4" text:anchor-type="char" svg:x="3.117cm" svg:y="0.259cm" svg:width="12.024cm" svg:height="9.756cm" draw:z-index="3"><draw:image xlink:href="Pictures/100000000000028C00000211732AC3DAED0D7C81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7">To Create the Sub-Ous, right-click Top-Level OU, “New”, “Organisational Unit”</text:span></text:p>
          </table:table-cell>
        </table:table-row>
        <table:table-row table:style-name="Table2.2">
          <table:table-cell table:style-name="Table2.A2" office:value-type="string">
            <text:p text:style-name="P31"><draw:frame draw:style-name="fr2" draw:name="Image5" text:anchor-type="char" svg:x="4.202cm" svg:y="0.395cm" svg:width="7.87cm" svg:height="5.038cm" draw:z-index="4"><draw:image xlink:href="Pictures/10000000000002BC000001C0D417D5D7E82AC042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7">Similarly to the Top-Level OU, we name the OU and Protect from Accidental Deletion</text:span></text:p>
          </table:table-cell>
        </table:table-row>
        <table:table-row table:style-name="TableLine2152248389376">
          <table:table-cell table:style-name="Table2.A2" office:value-type="string">
            <text:p text:style-name="P31"><draw:frame draw:style-name="fr2" draw:name="Image6" text:anchor-type="char" svg:x="2.702cm" svg:y="0.206cm" svg:width="12.462cm" svg:height="9.684cm" draw:z-index="5"><draw:image xlink:href="Pictures/10000000000001D70000016ED97F7EF2A0296502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7">- The five Sub-Organisational Units have been added</text:p>
          </table:table-cell>
        </table:table-row>
      </table:table>
      <text:p text:style-name="P4"/>
      <text:p text:style-name="P3"/>
      <text:p text:style-name="P8"><text:span text:style-name="T3">4</text:span><text:span text:style-name="T2"> -(Part </text:span><text:span text:style-name="T3">2</text:span><text:span text:style-name="T2"> – </text:span><text:span text:style-name="T3">Delegating OU Control and Adding Users</text:span><text:span text:style-name="T2">)</text:span></text:p>
      <text:p text:style-name="P7"/>
      <text:p text:style-name="P10">Delegating Control</text:p>
      <table:table table:name="Table3" table:style-name="Table3" table:template-name="Default Style">
        <table:table-column table:style-name="Table3.A"/>
        <table:table-row table:style-name="TableLine2152248403520">
          <table:table-cell table:style-name="Table3.A1" office:value-type="string">
            <text:p text:style-name="P31"><draw:frame draw:style-name="fr2" draw:name="Image7" text:anchor-type="char" svg:x="2.729cm" svg:y="0.307cm" svg:width="10.61cm" svg:height="3.731cm" draw:z-index="6"><draw:image xlink:href="Pictures/10000000000001910000008DC636CE138ACA8E69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8">To begin Delegating Control I Right-Click the OU and select “Delegate Control”</text:span></text:p>
          </table:table-cell>
        </table:table-row>
        <table:table-row table:style-name="Table3.2">
          <table:table-cell table:style-name="Table3.A2" office:value-type="string">
            <text:p text:style-name="P31"/>
            <text:p text:style-name="P31"/>
            <text:p text:style-name="P31"><text:soft-page-break/></text:p>
            <text:p text:style-name="P31"><draw:frame draw:style-name="fr2" draw:name="Image8" text:anchor-type="char" svg:x="2.517cm" svg:y="0.046cm" svg:width="12.039cm" svg:height="6.588cm" draw:z-index="7"><draw:image xlink:href="Pictures/10000000000001C7000000F9E78A1BF3AD9B62C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8">I search for the user who will be granted control. In this case it is John Rodgers – the primary IT Manager</text:span></text:p>
          </table:table-cell>
        </table:table-row>
        <table:table-row table:style-name="Table3.2">
          <table:table-cell table:style-name="Table3.A2" office:value-type="string">
            <text:p text:style-name="P31"><draw:frame draw:style-name="fr2" draw:name="Image9" text:anchor-type="char" svg:x="2.185cm" svg:y="0.376cm" svg:width="12.859cm" svg:height="9.313cm" draw:z-index="8"><draw:image xlink:href="Pictures/10000000000001E6000001609474A28F5D163B7E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8">I then grant him the permissions that he can use</text:span></text:p>
          </table:table-cell>
        </table:table-row>
        <table:table-row table:style-name="Table3.2">
          <table:table-cell table:style-name="Table3.A2" office:value-type="string">
            <text:p text:style-name="P31"/>
            <text:p text:style-name="P31"/>
            <text:p text:style-name="P31"><draw:frame draw:style-name="fr2" draw:name="Image10" text:anchor-type="char" svg:x="5.258cm" svg:y="0.132cm" svg:width="6.295cm" svg:height="4.935cm" draw:z-index="9"><draw:image xlink:href="Pictures/10000000000001D80000017211D86BEEFC7AB6D9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- <text:span text:style-name="T8">Delegation of Control is completed</text:span></text:p>
          </table:table-cell>
        </table:table-row>
      </table:table>
      <text:p text:style-name="P3"/>
      <text:p text:style-name="P10">Adding Users</text:p>
      <table:table table:name="Table4" table:style-name="Table4" table:template-name="Default Style">
        <table:table-column table:style-name="Table4.A"/>
        <table:table-row table:style-name="TableLine2152248401344">
          <table:table-cell table:style-name="Table4.A1" office:value-type="string">
            <text:p text:style-name="P31"/>
            <text:p text:style-name="P31"><draw:frame draw:style-name="fr4" draw:name="Image11" text:anchor-type="char" svg:width="14.711cm" svg:height="8.943cm" draw:z-index="10"><draw:image xlink:href="Pictures/100000000000022C000001522B1A52AA33603D2F.jpg" xlink:type="simple" xlink:show="embed" xlink:actuate="onLoad" draw:mime-type="image/jpeg"/></draw:frame>- <text:span text:style-name="T18">To create a new User, I Right-Click the Target OU (in this case HR) and select “New” → “User”</text:span></text:p>
          </table:table-cell>
        </table:table-row>
        <table:table-row table:style-name="Table4.2">
          <table:table-cell table:style-name="Table4.A2" office:value-type="string">
            <text:p text:style-name="P31"><draw:frame draw:style-name="fr2" draw:name="Image12" text:anchor-type="char" svg:x="4.872cm" svg:y="0.24cm" svg:width="6.893cm" svg:height="5.999cm" draw:z-index="11"><draw:image xlink:href="Pictures/10000000000001A7000001703B4BA213C1675527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18">I then assign the basic details for the user</text:span></text:p>
          </table:table-cell>
        </table:table-row>
        <table:table-row table:style-name="Table4.2">
          <table:table-cell table:style-name="Table4.A2" office:value-type="string">
            <text:p text:style-name="P31"><draw:frame draw:style-name="fr2" draw:name="Image13" text:anchor-type="char" svg:x="4.713cm" svg:y="0.272cm" svg:width="6.682cm" svg:height="5.664cm" draw:z-index="12"><draw:image xlink:href="Pictures/10000000000001AB0000016AA5E0646477DF06C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</text:p>
            <text:p text:style-name="P31"/>
            <text:p text:style-name="P31">- <text:span text:style-name="T18">I then assign them a password that they can change at their next logon</text:span></text:p>
          </table:table-cell>
        </table:table-row>
        <table:table-row table:style-name="Table4.2">
          <table:table-cell table:style-name="Table4.A2" office:value-type="string">
            <text:p text:style-name="P31"><draw:frame draw:style-name="fr2" draw:name="Image14" text:anchor-type="char" svg:x="3.814cm" svg:y="0.074cm" svg:width="8.366cm" svg:height="7.191cm" draw:z-index="13"><draw:image xlink:href="Pictures/10000000000001AB0000016F56D4080F4399610B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18">The User account is now completed and is on the domain</text:span></text:p>
          </table:table-cell>
        </table:table-row>
      </table:table>
      <text:p text:style-name="P3"/>
      <text:p text:style-name="P22"><text:span text:style-name="T4">4</text:span><text:span text:style-name="T2"> -(Part </text:span><text:span text:style-name="T4">2</text:span><text:span text:style-name="T2"> – </text:span><text:span text:style-name="T4">Every day Active Directory Tasks</text:span><text:span text:style-name="T2">)</text:span></text:p>
      <text:p text:style-name="P9"/>
      <text:p text:style-name="P46">Reseting a Password</text:p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31"><draw:frame draw:style-name="fr2" draw:name="Image15" text:anchor-type="char" svg:x="2.794cm" svg:y="0.423cm" svg:width="11.218cm" svg:height="4.048cm" draw:z-index="14"><draw:image xlink:href="Pictures/10000000000001A8000000996A552C09DC373019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19">We must first find the target user who has requested a password change</text:span></text:p>
          </table:table-cell>
        </table:table-row>
        <table:table-row table:style-name="Table6.1">
          <table:table-cell table:style-name="Table6.A2" office:value-type="string">
            <text:p text:style-name="P31"><draw:frame draw:style-name="fr2" draw:name="Image17" text:anchor-type="char" svg:x="9.065cm" svg:y="0.185cm" svg:width="6.749cm" svg:height="5.856cm" draw:z-index="16"><draw:image xlink:href="Pictures/100000000000015400000127E2CD63247E859885.jpg" xlink:type="simple" xlink:show="embed" xlink:actuate="onLoad" draw:mime-type="image/jpeg"/></draw:frame><draw:frame draw:style-name="fr2" draw:name="Image16" text:anchor-type="char" svg:x="0.572cm" svg:y="0.466cm" svg:width="7.812cm" svg:height="5.158cm" draw:z-index="15"><draw:image xlink:href="Pictures/100000000000016A000000EF619BEEB66F7CA8B3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- <text:span text:style-name="T19">We adjust our search filters and then input their name to show results</text:span></text:p>
            <text:p text:style-name="P31"/>
          </table:table-cell>
        </table:table-row>
        <table:table-row table:style-name="Table6.1">
          <table:table-cell table:style-name="Table6.A2" office:value-type="string">
            <text:p text:style-name="P31"/>
            <text:p text:style-name="P31"><draw:frame draw:style-name="fr2" draw:name="Image18" text:anchor-type="char" svg:x="4.676cm" svg:y="0.025cm" svg:width="7.832cm" svg:height="6.059cm" draw:z-index="17"><draw:image xlink:href="Pictures/1000000000000128000000E52CE2C95F5FC2762A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19">We Right-Click then Reset Password</text:span></text:p>
          </table:table-cell>
        </table:table-row>
        <table:table-row table:style-name="Table6.1">
          <table:table-cell table:style-name="Table6.A2" office:value-type="string">
            <text:p text:style-name="P31"><draw:frame draw:style-name="fr2" draw:name="Image19" text:anchor-type="char" svg:x="2.418cm" svg:y="0.453cm" svg:width="11.751cm" svg:height="6.671cm" draw:z-index="18"><draw:image xlink:href="Pictures/100000000000015B000000C52451CDB4F1B8571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19">We choose a temporary password for them to type in at their login screen. They can then change this to a personal password when prompted</text:span></text:p>
          </table:table-cell>
        </table:table-row>
      </table:table>
      <text:p text:style-name="P44"/>
      <text:p text:style-name="P23"><text:span text:style-name="T9">U</text:span><text:span text:style-name="T10">nlock an Account</text:span></text:p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31"/>
            <text:p text:style-name="P31"><draw:frame draw:style-name="fr2" draw:name="Image20" text:anchor-type="char" svg:x="2.45cm" svg:y="0.026cm" svg:width="11.218cm" svg:height="4.048cm" draw:z-index="19"><draw:image xlink:href="Pictures/10000000000001A8000000996A552C09DC373019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2"><text:span text:style-name="T20">- </text:span><text:span text:style-name="T21">We must first find the target user who </text:span><text:span text:style-name="T22">has a locked account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31"><draw:frame draw:style-name="fr2" draw:name="Image21" text:anchor-type="char" svg:x="0.57cm" svg:y="0.411cm" svg:width="7.812cm" svg:height="5.158cm" draw:z-index="21"><draw:image xlink:href="Pictures/100000000000016A000000EF619BEEB66F7CA8B3.jpg" xlink:type="simple" xlink:show="embed" xlink:actuate="onLoad" draw:mime-type="image/jpeg"/></draw:frame><draw:frame draw:style-name="fr2" draw:name="Image22" text:anchor-type="char" svg:x="9.065cm" svg:y="0.466cm" svg:width="6.749cm" svg:height="5.856cm" draw:z-index="20"><draw:image xlink:href="Pictures/100000000000015400000127E2CD63247E85988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2">- <text:span text:style-name="T19">We adjust our search filters and then input their name to show results</text:span></text:p>
          </table:table-cell>
        </table:table-row>
        <table:table-row table:style-name="Table5.1">
          <table:table-cell table:style-name="Table5.A2" office:value-type="string">
            <text:p text:style-name="P31"><draw:frame draw:style-name="fr2" draw:name="Image23" text:anchor-type="char" svg:x="4.646cm" svg:y="0.355cm" svg:width="7.514cm" svg:height="6.006cm" draw:z-index="22"><draw:image xlink:href="Pictures/100000000000011C000000E39E8EDF67DDCA3C5C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27">We go to properties</text:span></text:p>
          </table:table-cell>
        </table:table-row>
        <table:table-row table:style-name="Table5.1">
          <table:table-cell table:style-name="Table5.A2" office:value-type="string">
            <text:p text:style-name="P31"><draw:frame draw:style-name="fr1" draw:name="Image24" text:anchor-type="char" svg:width="10.742cm" svg:height="7.223cm" draw:z-index="23"><draw:image xlink:href="Pictures/10000000000001960000011131EE2818C1365DB7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27">Account Tab then Unlock Account</text:span></text:p>
          </table:table-cell>
        </table:table-row>
      </table:table>
      <text:p text:style-name="P44"/>
      <text:p text:style-name="P44"/>
      <text:p text:style-name="P44"/>
      <text:p text:style-name="P47"/>
      <text:p text:style-name="P24"><text:soft-page-break/><text:span text:style-name="T11">D</text:span><text:span text:style-name="T12">isable an Account</text:span></text:p>
      <text:h text:style-name="P43" text:outline-level="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3"><draw:frame draw:style-name="fr2" draw:name="Image25" text:anchor-type="char" svg:x="2.794cm" svg:y="0.423cm" svg:width="11.218cm" svg:height="4.048cm" draw:z-index="24"><draw:image xlink:href="Pictures/10000000000001A8000000996A552C09DC373019.jpg" xlink:type="simple" xlink:show="embed" xlink:actuate="onLoad" draw:mime-type="image/jpe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9"><text:span text:style-name="T20">- </text:span><text:span text:style-name="T21">We must first find the target user who </text:span><text:span text:style-name="T23">needs to be disabled</text:span></text:p>
          </table:table-cell>
        </table:table-row>
        <table:table-row table:style-name="Table7.1">
          <table:table-cell table:style-name="Table7.A2" office:value-type="string">
            <text:p text:style-name="P33"><draw:frame draw:style-name="fr2" draw:name="Image26" text:anchor-type="char" svg:x="0.572cm" svg:y="0.466cm" svg:width="7.812cm" svg:height="5.158cm" draw:z-index="25"><draw:image xlink:href="Pictures/100000000000016A000000EF619BEEB66F7CA8B3.jpg" xlink:type="simple" xlink:show="embed" xlink:actuate="onLoad" draw:mime-type="image/jpeg"/></draw:frame><draw:frame draw:style-name="fr2" draw:name="Image27" text:anchor-type="char" svg:x="9.065cm" svg:y="0.185cm" svg:width="6.749cm" svg:height="5.856cm" draw:z-index="26"><draw:image xlink:href="Pictures/100000000000015400000127E2CD63247E859885.jpg" xlink:type="simple" xlink:show="embed" xlink:actuate="onLoad" draw:mime-type="image/jpe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- <text:span text:style-name="T19">We adjust our search filters and then input their name to show results</text:span></text:p>
            <text:p text:style-name="P33"/>
          </table:table-cell>
        </table:table-row>
        <table:table-row table:style-name="Table7.1">
          <table:table-cell table:style-name="Table7.A2" office:value-type="string">
            <text:p text:style-name="P33"><draw:frame draw:style-name="fr2" draw:name="Image28" text:anchor-type="char" svg:x="3.814cm" svg:y="0.037cm" svg:width="9.181cm" svg:height="6.985cm" draw:z-index="27"><draw:image xlink:href="Pictures/100000000000015B00000108161523ED277542FE.jpg" xlink:type="simple" xlink:show="embed" xlink:actuate="onLoad" draw:mime-type="image/jpe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- <text:span text:style-name="T27">We click on Disable Account</text:span></text:p>
          </table:table-cell>
        </table:table-row>
        <table:table-row table:style-name="Table7.1">
          <table:table-cell table:style-name="Table7.A2" office:value-type="string">
            <text:p text:style-name="P33"/>
            <text:p text:style-name="P33"/>
            <text:p text:style-name="P33"/>
            <text:p text:style-name="P33"/>
            <text:p text:style-name="P33"><draw:frame draw:style-name="fr2" draw:name="Image29" text:anchor-type="char" svg:x="3.311cm" svg:y="0.143cm" svg:width="10.557cm" svg:height="4.683cm" draw:z-index="28"><draw:image xlink:href="Pictures/100000000000018F000000B1A6E0BF4008CA7AC3.jpg" xlink:type="simple" xlink:show="embed" xlink:actuate="onLoad" draw:mime-type="image/jpeg"/></draw:frame><text:soft-pag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- <text:span text:style-name="T27">Account has been disabled</text:span></text:p>
          </table:table-cell>
        </table:table-row>
      </table:table>
      <text:p text:style-name="P5"/>
      <text:p text:style-name="P24"><text:span text:style-name="T11">D</text:span><text:span text:style-name="T13">elete</text:span><text:span text:style-name="T12"> an Account</text:span></text:p>
      <text:p text:style-name="P4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3"><draw:frame draw:style-name="fr2" draw:name="Image30" text:anchor-type="char" svg:x="2.794cm" svg:y="0.423cm" svg:width="11.218cm" svg:height="4.048cm" draw:z-index="29"><draw:image xlink:href="Pictures/10000000000001A8000000996A552C09DC373019.jpg" xlink:type="simple" xlink:show="embed" xlink:actuate="onLoad" draw:mime-type="image/jpe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9"><text:span text:style-name="T20">- </text:span><text:span text:style-name="T21">We must first find the target user who </text:span><text:span text:style-name="T23">must be deleted</text:span></text:p>
          </table:table-cell>
        </table:table-row>
        <table:table-row table:style-name="Table8.1">
          <table:table-cell table:style-name="Table8.A2" office:value-type="string">
            <text:p text:style-name="P33"><draw:frame draw:style-name="fr2" draw:name="Image31" text:anchor-type="char" svg:x="0.572cm" svg:y="0.466cm" svg:width="7.812cm" svg:height="5.158cm" draw:z-index="30"><draw:image xlink:href="Pictures/100000000000016A000000EF619BEEB66F7CA8B3.jpg" xlink:type="simple" xlink:show="embed" xlink:actuate="onLoad" draw:mime-type="image/jpeg"/></draw:frame><draw:frame draw:style-name="fr2" draw:name="Image32" text:anchor-type="char" svg:x="9.065cm" svg:y="0.185cm" svg:width="6.749cm" svg:height="5.856cm" draw:z-index="31"><draw:image xlink:href="Pictures/100000000000015400000127E2CD63247E859885.jpg" xlink:type="simple" xlink:show="embed" xlink:actuate="onLoad" draw:mime-type="image/jpe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- <text:span text:style-name="T19">We adjust our search filters and then input their name to show results</text:span></text:p>
            <text:p text:style-name="P33"/>
          </table:table-cell>
        </table:table-row>
        <table:table-row table:style-name="Table8.1">
          <table:table-cell table:style-name="Table8.A2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draw:frame draw:style-name="fr2" draw:name="Image33" text:anchor-type="char" svg:x="5.731cm" svg:y="0.002cm" svg:width="7.461cm" svg:height="6.537cm" draw:z-index="32"><draw:image xlink:href="Pictures/10000000000001AC00000177CC9AF3732147523F.jpg" xlink:type="simple" xlink:show="embed" xlink:actuate="onLoad" draw:mime-type="image/jpeg"/></draw:frame><text:soft-pag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9"><text:span text:style-name="T20">- </text:span><text:span text:style-name="T23">We Right-Click the user and select Delete</text:span></text:p>
            <text:p text:style-name="P33"/>
          </table:table-cell>
        </table:table-row>
      </table:table>
      <text:p text:style-name="P5"/>
      <text:p text:style-name="P14">Deleting and Renaming an Organisational Unit</text:p>
      <text:p text:style-name="P26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38"><draw:frame draw:style-name="fr2" draw:name="Image34" text:anchor-type="char" svg:x="0.042cm" svg:y="0.339cm" svg:width="8.389cm" svg:height="6.271cm" draw:z-index="33"><draw:image xlink:href="Pictures/100000000000018C0000012868D5E1243D660B52.jpg" xlink:type="simple" xlink:show="embed" xlink:actuate="onLoad" draw:mime-type="image/jpeg"/></draw:frame><draw:frame draw:style-name="fr2" draw:name="Image35" text:anchor-type="char" svg:x="8.562cm" svg:y="0.146cm" svg:width="7.964cm" svg:height="3.658cm" draw:z-index="34"><draw:image xlink:href="Pictures/10000000000001A2000000C08BCEC9A86BC22E19.jpg" xlink:type="simple" xlink:show="embed" xlink:actuate="onLoad" draw:mime-type="image/jpeg"/></draw:frame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- Select and Right-Click the chosen OU and then select Delete</text:p>
            <text:p text:style-name="P38"/>
          </table:table-cell>
        </table:table-row>
        <table:table-row table:style-name="Table9.1">
          <table:table-cell table:style-name="Table9.A2" office:value-type="string">
            <text:p text:style-name="P38"><draw:frame draw:style-name="fr2" draw:name="Image36" text:anchor-type="char" svg:x="0.157cm" svg:y="0.265cm" svg:width="6.756cm" svg:height="5.888cm" draw:z-index="35"><draw:image xlink:href="Pictures/100000000000016E0000013FA4EB9BDB3D0CBE2F.jpg" xlink:type="simple" xlink:show="embed" xlink:actuate="onLoad" draw:mime-type="image/jpeg"/></draw:frame></text:p>
            <text:p text:style-name="P38"><draw:frame draw:style-name="fr2" draw:name="Image37" text:anchor-type="char" svg:x="7.239cm" svg:y="0.303cm" svg:width="7.675cm" svg:height="1.591cm" draw:z-index="36"><draw:image xlink:href="Pictures/100000000000019A000000550578F1D3EC80F85D.jpg" xlink:type="simple" xlink:show="embed" xlink:actuate="onLoad" draw:mime-type="image/jpeg"/></draw:frame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- Select and Right-Click the chosen OU and select Rename</text:p>
          </table:table-cell>
        </table:table-row>
      </table:table>
      <text:p text:style-name="P12"/>
      <text:p text:style-name="P14"><text:soft-page-break/>Search Inside an Organisational Unit</text:p>
      <text:p text:style-name="P26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31"><draw:frame draw:style-name="fr2" draw:name="Image38" text:anchor-type="char" svg:x="0.975cm" svg:y="0.196cm" svg:width="12.792cm" svg:height="5.445cm" draw:z-index="37"><draw:image xlink:href="Pictures/100000000000021A000000E55CFB2F1298CB4039.jpg" xlink:type="simple" xlink:show="embed" xlink:actuate="onLoad" draw:mime-type="image/jpeg"/></draw:frame><draw:frame draw:style-name="fr2" draw:name="Image39" text:anchor-type="char" svg:x="8.535cm" svg:y="0.196cm" svg:width="8.045cm" svg:height="3.946cm" draw:z-index="38"><draw:image xlink:href="Pictures/100000000000019E000000CB63720273EB06D58D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29">Right-Click and select Find and then adjust the Search Filter to commence a Search inside the organisational unit</text:span></text:p>
          </table:table-cell>
        </table:table-row>
      </table:table>
      <text:p text:style-name="P12"/>
      <text:p text:style-name="P15">Export an Organisational Unit as a List</text:p>
      <text:p text:style-name="P26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31"/>
            <text:p text:style-name="P31"><draw:frame draw:style-name="fr2" draw:name="Image40" text:anchor-type="char" svg:x="0.598cm" svg:y="0cm" svg:width="10.982cm" svg:height="7.179cm" draw:z-index="39"><draw:image xlink:href="Pictures/100000000000020200000150C9EB61F60F2DB0EB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><draw:frame draw:style-name="fr2" draw:name="Image41" text:anchor-type="char" svg:x="0.418cm" svg:y="4.648cm" svg:width="8.352cm" svg:height="3.625cm" draw:z-index="40"><draw:image xlink:href="Pictures/1000000000000212000000E6234F56C2CA74C397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0">Select and Right-Click your target Organisational Unit and select Export List. Then Name and Save.</text:span></text:p>
            <text:p text:style-name="P31"/>
            <text:p text:style-name="P31"/>
          </table:table-cell>
        </table:table-row>
      </table:table>
      <text:p text:style-name="P16"><text:soft-page-break/>Remove Organisational Unit Deletion Protection</text:p>
      <text:p text:style-name="P26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31"><draw:frame draw:style-name="fr2" draw:name="Image42" text:anchor-type="char" svg:x="0.347cm" svg:y="0.206cm" svg:width="8.072cm" svg:height="5.54cm" draw:z-index="41"><draw:image xlink:href="Pictures/10000000000001950000011688BAE032486C0250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1">Go to the View Tab and then select Advanced Features</text:span></text:p>
          </table:table-cell>
        </table:table-row>
        <table:table-row table:style-name="Table12.1">
          <table:table-cell table:style-name="Table12.A2" office:value-type="string">
            <text:p text:style-name="P31"><draw:frame draw:style-name="fr2" draw:name="Image43" text:anchor-type="char" svg:x="1.127cm" svg:y="0.132cm" svg:width="6.907cm" svg:height="7.549cm" draw:z-index="42"><draw:image xlink:href="Pictures/100000000000013800000155890703854F8CE95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1">Right-Click target Organisational Unit and select Properties</text:span></text:p>
          </table:table-cell>
        </table:table-row>
        <table:table-row table:style-name="Table12.1">
          <table:table-cell table:style-name="Table12.A2" office:value-type="string">
            <text:p text:style-name="P31"><draw:frame draw:style-name="fr2" draw:name="Image46" text:anchor-type="char" svg:x="0.228cm" svg:y="0.302cm" svg:width="4.339cm" svg:height="1.058cm" draw:z-index="45"><draw:image xlink:href="Pictures/10000000000000A400000028053BBF7B4C11E4CF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>- <text:span text:style-name="T31">Go to the Object Tab</text:span></text:p>
          </table:table-cell>
        </table:table-row>
        <table:table-row table:style-name="Table12.1">
          <table:table-cell table:style-name="Table12.A2" office:value-type="string">
            <text:p text:style-name="P31"><draw:frame draw:style-name="fr2" draw:name="Image44" text:anchor-type="char" svg:x="0.663cm" svg:y="0.056cm" svg:width="5.704cm" svg:height="4.923cm" draw:z-index="43"><draw:image xlink:href="Pictures/100000000000013300000109FC726CA79A5E358E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1">Uncheck Protect Object from accidental deletion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31"><draw:frame draw:style-name="fr2" draw:name="Image45" text:anchor-type="char" svg:x="0.169cm" svg:y="0.069cm" svg:width="7.99cm" svg:height="4.683cm" draw:z-index="44"><draw:image xlink:href="Pictures/100000000000012E000000B1350F323105E466F0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1">The Organisational Unit can now be, and is now deleted</text:span></text:p>
          </table:table-cell>
        </table:table-row>
      </table:table>
      <text:p text:style-name="P12"/>
      <text:p text:style-name="P17">View the File Path of an Object</text:p>
      <text:p text:style-name="P12"/>
      <text:p text:style-name="P13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4"><draw:frame draw:style-name="fr2" draw:name="Image47" text:anchor-type="char" svg:x="0.347cm" svg:y="0.206cm" svg:width="8.072cm" svg:height="5.54cm" draw:z-index="46"><draw:image xlink:href="Pictures/10000000000001950000011688BAE032486C0250.jpg" xlink:type="simple" xlink:show="embed" xlink:actuate="onLoad" draw:mime-type="image/jpeg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- <text:span text:style-name="T31">Go to the View Tab and then select Advanced Features</text:span></text:p>
          </table:table-cell>
        </table:table-row>
        <table:table-row table:style-name="Table13.1">
          <table:table-cell table:style-name="Table13.A2" office:value-type="string">
            <text:p text:style-name="P34"><draw:frame draw:style-name="fr2" draw:name="Image48" text:anchor-type="char" svg:x="1.127cm" svg:y="0.132cm" svg:width="6.907cm" svg:height="7.549cm" draw:z-index="47"><draw:image xlink:href="Pictures/100000000000013800000155890703854F8CE955.jpg" xlink:type="simple" xlink:show="embed" xlink:actuate="onLoad" draw:mime-type="image/jpeg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- <text:span text:style-name="T31">Right-Click target Organisational Unit and select Properties</text:span></text:p>
          </table:table-cell>
        </table:table-row>
        <table:table-row table:style-name="Table13.1">
          <table:table-cell table:style-name="Table13.A2" office:value-type="string">
            <text:p text:style-name="P34"/>
            <text:p text:style-name="P34"/>
            <text:p text:style-name="P34"/>
            <text:p text:style-name="P34"/>
            <text:p text:style-name="P34"><draw:frame draw:style-name="fr2" draw:name="Image49" text:anchor-type="char" svg:x="0.836cm" svg:y="0.064cm" svg:width="10.372cm" svg:height="3.307cm" draw:z-index="48"><draw:image xlink:href="Pictures/10000000000001880000007DF824779FEE419E25.jpg" xlink:type="simple" xlink:show="embed" xlink:actuate="onLoad" draw:mime-type="image/jpeg"/></draw:frame><text:soft-page-break/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- <text:span text:style-name="T31">Select the Object Tab</text:span></text:p>
          </table:table-cell>
        </table:table-row>
        <table:table-row table:style-name="Table13.1">
          <table:table-cell table:style-name="Table13.A2" office:value-type="string">
            <text:p text:style-name="P34"><draw:frame draw:style-name="fr2" draw:name="Image50" text:anchor-type="char" svg:x="1.088cm" svg:y="0.011cm" svg:width="10.134cm" svg:height="7.382cm" draw:z-index="49"><draw:image xlink:href="Pictures/100000000000017F000001171493BD0C9C2D17E7.jpg" xlink:type="simple" xlink:show="embed" xlink:actuate="onLoad" draw:mime-type="image/jpeg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- <text:span text:style-name="T32">The File Path for the object is now viewable</text:span></text:p>
          </table:table-cell>
        </table:table-row>
      </table:table>
      <text:p text:style-name="P13"/>
      <text:p text:style-name="P25"><text:span text:style-name="T14">An Incorrectly Added Computer/</text:span><text:span text:style-name="T15">Move a Computer to a New Organisational Unit</text:span></text:p>
      <text:p text:style-name="P25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31"><draw:frame draw:style-name="fr2" draw:name="Image51" text:anchor-type="char" svg:x="1.141cm" svg:y="0.222cm" svg:width="10.927cm" svg:height="7.514cm" draw:z-index="50"><draw:image xlink:href="Pictures/100000000000019D0000011C44D53DD62BF2100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3">First locate the computer that needs to be moved/incorrectly added</text:span></text:p>
            <text:p text:style-name="P31"/>
          </table:table-cell>
        </table:table-row>
        <text:soft-page-break/>
        <table:table-row table:style-name="Table14.1">
          <table:table-cell table:style-name="Table14.A2" office:value-type="string">
            <text:p text:style-name="P31"/>
          </table:table-cell>
        </table:table-row>
        <table:table-row table:style-name="Table14.1">
          <table:table-cell table:style-name="Table14.A2" office:value-type="string">
            <text:p text:style-name="P31"><draw:frame draw:style-name="fr2" draw:name="Image52" text:anchor-type="char" svg:x="0.4cm" svg:y="0.116cm" svg:width="8.811cm" svg:height="6.879cm" draw:z-index="51"><draw:image xlink:href="Pictures/100000000000014D00000104E124AA5D85024091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3">Right-Click the computer and select Move</text:span></text:p>
          </table:table-cell>
        </table:table-row>
        <table:table-row table:style-name="Table14.1">
          <table:table-cell table:style-name="Table14.A2" office:value-type="string">
            <text:p text:style-name="P31"><draw:frame draw:style-name="fr2" draw:name="Image53" text:anchor-type="char" svg:x="0.4cm" svg:y="0.222cm" svg:width="5.847cm" svg:height="7.091cm" draw:z-index="52"><draw:image xlink:href="Pictures/10000000000000DD0000010C4463312DDA62F482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3">Select the Organisational Unit to added the computer too. In this case it will be the Computers Organisational Unit.</text:span></text:p>
          </table:table-cell>
        </table:table-row>
        <table:table-row table:style-name="Table14.1">
          <table:table-cell table:style-name="Table14.A2" office:value-type="string">
            <text:p text:style-name="P31"/>
            <text:p text:style-name="P31"><draw:frame draw:style-name="fr3" draw:name="Image54" text:anchor-type="char" svg:width="16.806cm" svg:height="7.082cm" draw:z-index="53"><draw:image xlink:href="Pictures/10000000000002A90000011F0F73803246ECC808.jpg" xlink:type="simple" xlink:show="embed" xlink:actuate="onLoad" draw:mime-type="image/jpeg"/></draw:frame><text:soft-page-break/></text:p>
            <text:p text:style-name="P31">- <text:span text:style-name="T33">The computer is now in the Computers Organisational Unit</text:span></text:p>
          </table:table-cell>
        </table:table-row>
      </table:table>
      <text:p text:style-name="P49"/>
      <text:p text:style-name="P18"><text:span text:style-name="T28">C</text:span>reating a New Security Group</text:p>
      <text:p text:style-name="P45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31"/>
            <text:p text:style-name="P31"><draw:frame draw:style-name="fr1" draw:name="Image55" text:anchor-type="char" svg:width="14.182cm" svg:height="7.699cm" draw:z-index="54"><draw:image xlink:href="Pictures/100000000000021800000123BF65CDDFEDC692A1.jpg" xlink:type="simple" xlink:show="embed" xlink:actuate="onLoad" draw:mime-type="image/jpeg"/></draw:frame></text:p>
            <text:p text:style-name="P31">- <text:span text:style-name="T34">Right-Click on the target Organisational Unit, select New and select Group</text:span></text:p>
          </table:table-cell>
        </table:table-row>
        <table:table-row table:style-name="Table15.1">
          <table:table-cell table:style-name="Table15.A2" office:value-type="string">
            <text:p text:style-name="P31"><draw:frame draw:style-name="fr2" draw:name="Image56" text:anchor-type="char" svg:x="2.713cm" svg:y="0.064cm" svg:width="7.041cm" svg:height="4.521cm" draw:z-index="55"><draw:image xlink:href="Pictures/1000000000000152000000D974B27369FF174A14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- <text:span text:style-name="T34">Complete the Group Details</text:span></text:p>
          </table:table-cell>
        </table:table-row>
        <table:table-row table:style-name="Table15.1">
          <table:table-cell table:style-name="Table15.A2" office:value-type="string">
            <text:p text:style-name="P31"/>
            <text:p text:style-name="P31"><draw:frame draw:style-name="fr1" draw:name="Image57" text:anchor-type="char" svg:width="10.372cm" svg:height="1.746cm" draw:z-index="56"><draw:image xlink:href="Pictures/1000000000000188000000421EF83859EB21F65E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4">The Security Group is now created</text:span></text:p>
          </table:table-cell>
        </table:table-row>
      </table:table>
      <text:p text:style-name="P45"/>
      <text:p text:style-name="P19">Adding a User to a Group</text:p>
      <text:p text:style-name="P4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5"/>
            <text:p text:style-name="P35"><draw:frame draw:style-name="fr2" draw:name="Image58" text:anchor-type="char" svg:x="2.45cm" svg:y="0.026cm" svg:width="11.218cm" svg:height="4.048cm" draw:z-index="57"><draw:image xlink:href="Pictures/10000000000001A8000000996A552C09DC373019.jpg" xlink:type="simple" xlink:show="embed" xlink:actuate="onLoad" draw:mime-type="image/jpe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40"><text:span text:style-name="T20">- </text:span><text:span text:style-name="T21">We must first find the target user who </text:span><text:span text:style-name="T24">we want to add to a Group</text:span></text:p>
          </table:table-cell>
        </table:table-row>
        <table:table-row table:style-name="Table16.1">
          <table:table-cell table:style-name="Table16.A2" office:value-type="string">
            <text:p text:style-name="P35"><draw:frame draw:style-name="fr2" draw:name="Image59" text:anchor-type="char" svg:x="0.57cm" svg:y="0.411cm" svg:width="7.812cm" svg:height="5.158cm" draw:z-index="58"><draw:image xlink:href="Pictures/100000000000016A000000EF619BEEB66F7CA8B3.jpg" xlink:type="simple" xlink:show="embed" xlink:actuate="onLoad" draw:mime-type="image/jpeg"/></draw:frame><draw:frame draw:style-name="fr2" draw:name="Image60" text:anchor-type="char" svg:x="9.065cm" svg:y="0.466cm" svg:width="6.749cm" svg:height="5.856cm" draw:z-index="59"><draw:image xlink:href="Pictures/100000000000015400000127E2CD63247E859885.jpg" xlink:type="simple" xlink:show="embed" xlink:actuate="onLoad" draw:mime-type="image/jpe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- <text:span text:style-name="T19">We adjust our search filters and then input their name to show results</text:span></text:p>
          </table:table-cell>
        </table:table-row>
        <table:table-row table:style-name="Table16.1">
          <table:table-cell table:style-name="Table16.A2" office:value-type="string">
            <text:p text:style-name="P35"/>
            <text:p text:style-name="P35"><draw:frame draw:style-name="fr1" draw:name="Image61" text:anchor-type="char" svg:width="4.471cm" svg:height="3.731cm" draw:z-index="60"><draw:image xlink:href="Pictures/10000000000000A90000008D9A70278BEAD2DFD8.jpg" xlink:type="simple" xlink:show="embed" xlink:actuate="onLoad" draw:mime-type="image/jpe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<text:soft-page-break/>- <text:span text:style-name="T35">We select Add to a Group</text:span></text:p>
          </table:table-cell>
        </table:table-row>
        <table:table-row table:style-name="Table16.1">
          <table:table-cell table:style-name="Table16.A2" office:value-type="string">
            <text:p text:style-name="P35"/>
            <text:p text:style-name="P35"><draw:frame draw:style-name="fr1" draw:name="Image62" text:anchor-type="char" svg:width="11.906cm" svg:height="5.186cm" draw:z-index="61"><draw:image xlink:href="Pictures/10000000000001C2000000C42A8BD579E3784C65.jpg" xlink:type="simple" xlink:show="embed" xlink:actuate="onLoad" draw:mime-type="image/jpe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- <text:span text:style-name="T35">We then type in the name of our desired Group and Check Names to verify the Group exists</text:span></text:p>
          </table:table-cell>
        </table:table-row>
        <table:table-row table:style-name="Table16.1">
          <table:table-cell table:style-name="Table16.A2" office:value-type="string">
            <text:p text:style-name="P35"><draw:frame draw:style-name="fr3" draw:name="Image63" text:anchor-type="char" svg:width="16.806cm" svg:height="3.881cm" draw:z-index="62"><draw:image xlink:href="Pictures/1000000000000292000000986D24DD29D4A7456F.jpg" xlink:type="simple" xlink:show="embed" xlink:actuate="onLoad" draw:mime-type="image/jpeg"/></draw:frame></text:p>
            <text:p text:style-name="P35"/>
            <text:p text:style-name="P35">- <text:span text:style-name="T35">We then add the user to the Group and verify it by checking the Group</text:span></text:p>
          </table:table-cell>
        </table:table-row>
      </table:table>
      <text:p text:style-name="P27"/>
      <text:p text:style-name="P28"><text:span text:style-name="T16">Adding a </text:span><text:span text:style-name="T17">Group as a Member of Another Group</text:span></text:p>
      <text:p text:style-name="P50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6"/>
            <text:p text:style-name="P36"><draw:frame draw:style-name="fr2" draw:name="Image64" text:anchor-type="char" svg:x="2.45cm" svg:y="0.026cm" svg:width="11.218cm" svg:height="4.048cm" draw:z-index="63"><draw:image xlink:href="Pictures/10000000000001A8000000996A552C09DC373019.jpg" xlink:type="simple" xlink:show="embed" xlink:actuate="onLoad" draw:mime-type="image/jpe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41"><text:span text:style-name="T20">- </text:span><text:span text:style-name="T21">We must first find the target </text:span><text:span text:style-name="T25">Group </text:span><text:span text:style-name="T21">who </text:span><text:span text:style-name="T24">we want to add to a</text:span><text:span text:style-name="T25">nother</text:span><text:span text:style-name="T24"> Group</text:span></text:p>
          </table:table-cell>
        </table:table-row>
        <table:table-row table:style-name="Table17.1">
          <table:table-cell table:style-name="Table17.A2" office:value-type="string"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draw:frame draw:style-name="fr2" draw:name="Image65" text:anchor-type="char" svg:x="2.596cm" svg:y="0.136cm" svg:width="9.181cm" svg:height="7.197cm" draw:z-index="64"><draw:image xlink:href="Pictures/100000000000015B00000110E2B6BC938541F640.jpg" xlink:type="simple" xlink:show="embed" xlink:actuate="onLoad" draw:mime-type="image/jpeg"/></draw:frame><text:soft-page-break/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- <text:span text:style-name="T36">Once the target Group is found, we Add to a Group</text:span></text:p>
          </table:table-cell>
        </table:table-row>
        <table:table-row table:style-name="Table17.1">
          <table:table-cell table:style-name="Table17.A2" office:value-type="string">
            <text:p text:style-name="P36"><draw:frame draw:style-name="fr2" draw:name="Image66" text:anchor-type="char" svg:x="0.718cm" svg:y="0.249cm" svg:width="12.515cm" svg:height="5.318cm" draw:z-index="65"><draw:image xlink:href="Pictures/10000000000001D9000000C9F08508D7A254ED61.jpg" xlink:type="simple" xlink:show="embed" xlink:actuate="onLoad" draw:mime-type="image/jpe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- <text:span text:style-name="T36">We search for the Target Group and Check Names to verify it exists</text:span></text:p>
          </table:table-cell>
        </table:table-row>
        <table:table-row table:style-name="Table17.1">
          <table:table-cell table:style-name="Table17.A2" office:value-type="string">
            <text:p text:style-name="P36"><draw:frame draw:style-name="fr3" draw:name="Image67" text:anchor-type="char" svg:width="16.806cm" svg:height="3.844cm" draw:z-index="66"><draw:image xlink:href="Pictures/10000000000002CD000000A417C7B96AA9E3C59E.jpg" xlink:type="simple" xlink:show="embed" xlink:actuate="onLoad" draw:mime-type="image/jpeg"/></draw:frame></text:p>
            <text:p text:style-name="P36">- <text:span text:style-name="T36">We have successfully added the Group to the Main Security Group</text:span></text:p>
          </table:table-cell>
        </table:table-row>
      </table:table>
      <text:p text:style-name="P29"/>
      <text:p text:style-name="P20"><text:span text:style-name="T36">R</text:span>emoving a User or Group from a Group</text:p>
      <text:p text:style-name="P30"/>
      <table:table table:name="Table18" table:style-name="Table18" table:template-name="Default Style">
        <table:table-column table:style-name="Table18.A"/>
        <table:table-row table:style-name="Table18.1">
          <table:table-cell table:style-name="Table18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draw:frame draw:style-name="fr2" draw:name="Image68" text:anchor-type="char" svg:x="0.519cm" svg:y="0.03cm" svg:width="9.472cm" svg:height="7.408cm" draw:z-index="67"><draw:image xlink:href="Pictures/1000000000000166000001183A062D42D6665E86.jpg" xlink:type="simple" xlink:show="embed" xlink:actuate="onLoad" draw:mime-type="image/jpeg"/></draw:frame><text:soft-page-break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7">Select the Main Group and Right-Click and select Properties</text:span></text:p>
          </table:table-cell>
        </table:table-row>
        <table:table-row table:style-name="Table18.1">
          <table:table-cell table:style-name="Table18.A2" office:value-type="string">
            <text:p text:style-name="P31"><draw:frame draw:style-name="fr2" draw:name="Image69" text:anchor-type="char" svg:x="0.413cm" svg:y="0cm" svg:width="10.266cm" svg:height="9.79cm" draw:z-index="68"><draw:image xlink:href="Pictures/1000000000000184000001722189EB7CB5C126AF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7">Go to the Members Tab, select the Group and select Remove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draw:frame draw:style-name="fr2" draw:name="Image70" text:anchor-type="char" svg:x="0.418cm" svg:y="0.016cm" svg:width="6.738cm" svg:height="7.703cm" draw:z-index="69"><draw:image xlink:href="Pictures/100000000000015D0000018F63CAAB27024D7717.jpg" xlink:type="simple" xlink:show="embed" xlink:actuate="onLoad" draw:mime-type="image/jpeg"/></draw:frame><text:soft-page-break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7">Repeat process to Remove a User</text:span></text:p>
          </table:table-cell>
        </table:table-row>
        <table:table-row table:style-name="Table18.1">
          <table:table-cell table:style-name="Table18.A2" office:value-type="string">
            <text:p text:style-name="P31"><draw:frame draw:style-name="fr3" draw:name="Image71" text:anchor-type="char" svg:width="16.806cm" svg:height="4.59cm" draw:z-index="70"><draw:image xlink:href="Pictures/10000000000002B4000000BDFB72A00DCEAE6513.jpg" xlink:type="simple" xlink:show="embed" xlink:actuate="onLoad" draw:mime-type="image/jpeg"/></draw:frame></text:p>
            <text:p text:style-name="P31">- <text:span text:style-name="T37">Our Main Group does not have any Members</text:span></text:p>
          </table:table-cell>
        </table:table-row>
      </table:table>
      <text:p text:style-name="P20"/>
      <text:p text:style-name="P21">Deleting a Group</text:p>
      <text:p text:style-name="P45"/>
      <table:table table:name="Table19" table:style-name="Table19" table:template-name="Default Style">
        <table:table-column table:style-name="Table19.A"/>
        <table:table-row table:style-name="Table19.1">
          <table:table-cell table:style-name="Table19.A1" office:value-type="string">
            <text:p text:style-name="P31"/>
            <text:p text:style-name="P31"><draw:frame draw:style-name="fr1" draw:name="Image72" text:anchor-type="char" svg:width="8.176cm" svg:height="4.022cm" draw:z-index="71"><draw:image xlink:href="Pictures/100000000000013500000098AB80DEFC4E823075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8">Right-Click on Main Organisation Unit and select Find</text:span></text:p>
          </table:table-cell>
        </table:table-row>
        <table:table-row table:style-name="Table19.1">
          <table:table-cell table:style-name="Table19.A2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><draw:frame draw:style-name="fr2" draw:name="Image73" text:anchor-type="char" svg:x="0.73cm" svg:y="0.222cm" svg:width="12.171cm" svg:height="8.678cm" draw:z-index="72"><draw:image xlink:href="Pictures/10000000000001CC0000014833552FEB80B73F0A.jpg" xlink:type="simple" xlink:show="embed" xlink:actuate="onLoad" draw:mime-type="image/jpeg"/></draw:frame><text:soft-page-break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8">Adjust Search Filtering, type in target Group name and select Find </text:span></text:p>
          </table:table-cell>
        </table:table-row>
        <table:table-row table:style-name="Table19.1">
          <table:table-cell table:style-name="Table19.A2" office:value-type="string">
            <text:p text:style-name="P31"><draw:frame draw:style-name="fr1" draw:name="Image74" text:anchor-type="char" svg:width="7.17cm" svg:height="4.154cm" draw:z-index="73"><draw:image xlink:href="Pictures/100000000000010F0000009D0A5283D3C9A21812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- <text:span text:style-name="T38">Once the Target Group is Found, Right-Click and select Delete</text:span></text:p>
          </table:table-cell>
        </table:table-row>
        <table:table-row table:style-name="Table19.1">
          <table:table-cell table:style-name="Table19.A2" office:value-type="string">
            <text:p text:style-name="P31"/>
            <text:p text:style-name="P31"><draw:frame draw:style-name="fr3" draw:name="Image75" text:anchor-type="char" svg:width="16.806cm" svg:height="5.269cm" draw:z-index="74"><draw:image xlink:href="Pictures/10000000000002F7000000EE5CBF02944D3D28AF.jpg" xlink:type="simple" xlink:show="embed" xlink:actuate="onLoad" draw:mime-type="image/jpeg"/></draw:frame></text:p>
            <text:p text:style-name="P31"/>
            <text:p text:style-name="P31"><text:span text:style-name="T20">- </text:span><text:span text:style-name="T26">The Group has now been deleted from the Group Organisational Unit</text:span></text:p>
          </table:table-cell>
        </table:table-row>
      </table:table>
      <text:p text:style-name="P45"/>
      <text:p text:style-name="P45"/>
      <text:p text:style-name="P45"/>
      <text:p text:style-name="P51"><text:soft-page-break/><text:span text:style-name="T5">5</text:span><text:span text:style-name="T2"> -(Part </text:span><text:span text:style-name="T5">3</text:span><text:span text:style-name="T2"> – </text:span><text:span text:style-name="T5">Summery</text:span><text:span text:style-name="T2">)</text:span></text:p>
      <table:table table:name="Table20" table:style-name="Table20" table:template-name="Default Style">
        <table:table-column table:style-name="Table20.A"/>
        <table:table-row table:style-name="Table20.1">
          <table:table-cell table:style-name="Table20.A1" office:value-type="string">
            <text:p text:style-name="P31"><draw:frame draw:style-name="fr1" draw:name="Image76" text:anchor-type="char" svg:width="15.081cm" svg:height="6.694cm" draw:z-index="75"><draw:image xlink:href="Pictures/100000000000023A000000FD450BF322B23B6D42.jpg" xlink:type="simple" xlink:show="embed" xlink:actuate="onLoad" draw:mime-type="image/jpeg"/></draw:frame>- <text:span text:style-name="T39">The Northwind structural Overview</text:span></text:p>
          </table:table-cell>
        </table:table-row>
        <table:table-row table:style-name="Table20.1">
          <table:table-cell table:style-name="Table20.A2" office:value-type="string">
            <text:p text:style-name="P53"><draw:frame draw:style-name="fr1" draw:name="Image77" text:anchor-type="char" svg:width="13.705cm" svg:height="11.007cm" draw:z-index="76"><draw:image xlink:href="Pictures/1000000000000206000001A0F43E5BE072FEAB60.jpg" xlink:type="simple" xlink:show="embed" xlink:actuate="onLoad" draw:mime-type="image/jpeg"/></draw:frame>- A list of the Northwind User’s Computers in the Computers OU</text:p>
          </table:table-cell>
        </table:table-row>
        <table:table-row table:style-name="Table20.1">
          <table:table-cell table:style-name="Table20.A2" office:value-type="string">
            <text:p text:style-name="P31"><draw:frame draw:style-name="fr2" draw:name="Image78" text:anchor-type="char" svg:x="3.972cm" svg:y="0.076cm" svg:width="7.546cm" svg:height="4.912cm" draw:z-index="77"><draw:image xlink:href="Pictures/10000000000001BF00000123F3E0E91AFF470116.jpg" xlink:type="simple" xlink:show="embed" xlink:actuate="onLoad" draw:mime-type="image/jpe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- <text:span text:style-name="T40">The Northwind Finance Department OU</text:span></text:p>
          </table:table-cell>
        </table:table-row>
        <table:table-row table:style-name="Table20.1">
          <table:table-cell table:style-name="Table20.A2" office:value-type="string">
            <text:p text:style-name="P31"><draw:frame draw:style-name="fr1" draw:name="Image79" text:anchor-type="char" svg:width="14.446cm" svg:height="7.832cm" draw:z-index="78"><draw:image xlink:href="Pictures/100000000000022200000128C529B087E3D34402.jpg" xlink:type="simple" xlink:show="embed" xlink:actuate="onLoad" draw:mime-type="image/jpeg"/></draw:frame>- <text:span text:style-name="T40">The Northwind Groups OU</text:span></text:p>
          </table:table-cell>
        </table:table-row>
        <table:table-row table:style-name="Table20.1">
          <table:table-cell table:style-name="Table20.A2" office:value-type="string">
            <text:p text:style-name="P31">- <draw:frame draw:style-name="fr1" draw:name="Image80" text:anchor-type="char" svg:width="13.15cm" svg:height="8.07cm" draw:z-index="79"><draw:image xlink:href="Pictures/10000000000001F1000001319AE69043BE865712.jpg" xlink:type="simple" xlink:show="embed" xlink:actuate="onLoad" draw:mime-type="image/jpeg"/></draw:frame><text:span text:style-name="T40">The Northwind HR Department OU</text:span></text:p>
          </table:table-cell>
        </table:table-row>
        <text:soft-page-break/>
        <table:table-row table:style-name="Table20.1">
          <table:table-cell table:style-name="Table20.A2" office:value-type="string">
            <text:p text:style-name="P31"><draw:frame draw:style-name="fr1" draw:name="Image81" text:anchor-type="char" svg:width="13.15cm" svg:height="7.673cm" draw:z-index="80"><draw:image xlink:href="Pictures/10000000000001F100000122E8BCD069830BAA9D.jpg" xlink:type="simple" xlink:show="embed" xlink:actuate="onLoad" draw:mime-type="image/jpeg"/></draw:frame>- <text:span text:style-name="T40">The Northwind IT Department OU</text:span></text:p>
          </table:table-cell>
        </table:table-row>
        <table:table-row table:style-name="Table20.1">
          <table:table-cell table:style-name="Table20.A2" office:value-type="string">
            <text:p text:style-name="P31"><draw:frame draw:style-name="fr1" draw:name="Image82" text:anchor-type="char" svg:width="13.414cm" svg:height="7.779cm" draw:z-index="81"><draw:image xlink:href="Pictures/10000000000001FB000001261D9E27DB5938467B.jpg" xlink:type="simple" xlink:show="embed" xlink:actuate="onLoad" draw:mime-type="image/jpeg"/></draw:frame>- <text:span text:style-name="T40">The Northwind Sales Department OU</text:span></text:p>
          </table:table-cell>
        </table:table-row>
      </table:table>
      <text:p text:style-name="P51"><text:span text:style-name="T2"/></text:p>
      <text:p text:style-name="P51"><text:span text:style-name="T2"/></text:p>
      <text:p text:style-name="P45"/>
      <text:p text:style-name="P45"/>
      <text:p text:style-name="P45"/>
      <text:p text:style-name="P45"/>
      <text:h text:style-name="Heading_20_1" text:outline-level="1"/>
      <text:h text:style-name="P42" text:outline-level="1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31T13:32:11.423000000</meta:creation-date>
    <dc:date>2026-04-04T00:38:04.992000000</dc:date>
    <meta:editing-duration>PT15H46M22S</meta:editing-duration>
    <meta:editing-cycles>23</meta:editing-cycles>
    <meta:generator>LibreOffice/7.0.3.1$Windows_X86_64 LibreOffice_project/d7547858d014d4cf69878db179d326fc3483e082</meta:generator>
    <meta:document-statistic meta:table-count="20" meta:image-count="82" meta:object-count="0" meta:page-count="28" meta:paragraph-count="124" meta:word-count="1213" meta:character-count="6662" meta:non-whitespace-character-count="5560"/>
  </office:meta>
</office:document-meta>
</file>